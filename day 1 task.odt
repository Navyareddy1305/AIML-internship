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Title" style:master-page-name="Standard">
      <style:paragraph-properties style:page-number="1"/>
    </style:style>
    <style:style style:name="T1" style:family="text">
      <style:text-properties fo:font-size="23pt" style:font-size-asian="23pt" style:font-size-complex="2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x4qb0at2ogx3"/><text:span text:style-name="T1">What Is Pose Detection ?</text:span></text:p>
      <text:p text:style-name="Standard">Pose detection is an Artificial Intelligence (AI) and Computer Vision technology that detects and tracks human body positions and movements from images or videos. It identifies important body key points such as the head, shoulders, elbows, wrists, hips, knees, and ankles, and connects these points to create a virtual skeleton of the human body. </text:p>
      <text:p text:style-name="Standard"><text:s text:c="4"/>This helps computers understand human posture, gestures, and movement patterns like walking, running, sitting, exercising, or raising hands. Pose detection systems use machine learning and deep learning models to accurately recognize body joints in real time using images or webcam input.</text:p>
      <text:p text:style-name="Standard"><text:s text:c="3"/>The technology is widely used in fitness tracking, healthcare, gaming, sports analytics, animation, security systems, augmented reality (AR), virtual reality (VR), and virtual try-on applications. In fitness apps, it helps count exercises and check posture, while in healthcare it is used for rehabilitation monitoring and posture correction.</text:p>
      <text:p text:style-name="Standard"><text:s text:c="3"/>In fashion technology, pose detection helps virtual try-on systems fit clothes correctly on a user’s body. Popular pose detection frameworks include MediaPipe Pose, OpenPose, and MoveNet. The main advantages of pose detection are real-time tracking, contactless operation, and easy use with normal cameras, although factors like poor lighting, fast movement, or incorrect camera angles can affect accuracy. Overall, pose detection is an important AI technology that enables computers to understand and analyze human body movement efficiently.</text:p>
      <text:p text:style-name="Standard"/>
      <text:p text:style-name="Standard"/>
      <text:p text:style-name="Title"><text:bookmark text:name="_c2iiueg7eeyn"/>How Can Ai Help Fashion Shopping?</text:p>
      <text:p text:style-name="Standard">Artificial Intelligence (AI) helps fashion shopping by making online shopping more personalized, interactive, and convenient for customers. AI technologies such as computer vision, machine learning, deep learning, and recommendation systems are widely used in modern fashion and e-commerce platforms to improve customer experience and help users make better purchasing decisions.</text:p>
      <text:p text:style-name="Standard"><text:s text:c="2"/>One of the most important applications of AI in fashion shopping is virtual try-on technology, where customers can digitally try clothes, shoes, glasses, or accessories using a mobile camera or uploaded photo before purchasing. AI uses pose detection and body analysis to place clothing correctly on the user’s body, helping customers understand how the product may look in real life. </text:p>
      <text:p text:style-name="Standard"><text:s text:c="2"/>Another important application is body measurement AI, which estimates body dimensions such as height, chest size, waist size, and hip size from images or videos. This helps online shopping platforms recommend accurate clothing sizes, reducing size confusion and product returns. AI also provides personalized fashion recommendations by analyzing customer preferences, browsing history, purchase history, and fashion trends to suggest suitable outfits, colors, and styles according to individual taste.</text:p>
      <text:p text:style-name="Standard"><text:s text:c="3"/>Chatbots and virtual assistants powered by AI help customers by answering questions, providing product suggestions, and improving customer support. AI is also used for trend prediction, where fashion companies analyze social media, customer behavior, and market data to identify upcoming fashion trends and design products accordingly. In inventory management, AI helps stores manage stock levels and predict product demand more efficiently.</text:p>
      <text:p text:style-name="Standard"><text:s/>Additionally, AI-powered image recognition allows customers to search for clothing items using photos instead of text, making shopping easier and faster. Overall, AI improves the fashion shopping experience by making it more accurate, personalized, efficient, and engaging while helping businesses reduce returns, improve sales, and better understand custome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517" meta:character-count="3666" meta:non-whitespace-character-count="3140"/>
    <meta:generator>LibreOfficeDev/6.0.5.2$Linux_X86_64 LibreOffice_project/</meta:generator>
  </office:meta>
</office:document-meta>
</file>